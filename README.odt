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5c01"/>
    </style:style>
    <style:style style:name="P2" style:family="paragraph" style:parent-style-name="Standard">
      <style:text-properties officeooo:paragraph-rsid="001af160"/>
    </style:style>
    <style:style style:name="T1" style:family="text">
      <style:text-properties officeooo:rsid="001af160"/>
    </style:style>
    <style:style style:name="T2" style:family="text">
      <style:text-properties officeooo:rsid="001cf0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. Introduction</text:p>
      <text:p text:style-name="Standard"/>
      <text:p text:style-name="Standard">"Good Times With Good Friends" est un éditeur de jeux vidéos spécialisé dans</text:p>
      <text:p text:style-name="Standard">l'adaptation de jeux de société. Leur prochain projet est de réaliser une version</text:p>
      <text:p text:style-name="Standard">électronique du jeu "Khet". Khet est un jeu de stratégie pour deux joueurs qui rappelle</text:p>
      <text:p text:style-name="Standard">les échecs, mais basé sur la réflexion d'un rayon laser.</text:p>
      <text:p text:style-name="Standard">Votre équipe a été sélectionnée pour réaliser le développement.</text:p>
      <text:p text:style-name="Standard">Vous pouvez utiliser le langage et les libraires de votre choix comme Python/Pygame</text:p>
      <text:p text:style-name="Standard">ou C/SDL. Votre jeu doit pouvoir fonctionner sur l'une des trois plateformes majeures:</text:p>
      <text:p text:style-name="Standard">Windows, Linux et MacOS.</text:p>
      <text:p text:style-name="Standard">Le thème original de Khet est celui de l'ancienne Egypte, mais vous êtes libres d'en</text:p>
      <text:p text:style-name="Standard">changer si vous le souhaitez.</text:p>
      <text:p text:style-name="Standard"/>
      <text:p text:style-name="Standard"/>
      <text:p text:style-name="Standard">2. Expression fonctionnelle</text:p>
      <text:p text:style-name="Standard">2.1. Le jeu</text:p>
      <text:p text:style-name="Standard"/>
      <text:p text:style-name="Standard">Le plateau de jeu est composé de 8 lignes et 10 colonnes. Le but principal du jeu</text:p>
      <text:p text:style-name="Standard">est d'éclairer le pharaon adverse en utilisant lasers et miroirs. Certaines cases sont</text:p>
      <text:p text:style-name="Standard">réservés à un joueur en fonction de leur couleur (cases rouges pour le joueur rouge,</text:p>
      <text:p text:style-name="Standard">cases grises pour le joueur gris) :</text:p>
      <text:p text:style-name="Standard"/>
      <text:p text:style-name="Standard"><text:a xlink:type="simple" xlink:href="https://ibb.co/4SZfLTZ" text:style-name="Internet_20_link" text:visited-style-name="Visited_20_Internet_20_Link"><text:span text:style-name="T1">plateau de jeu</text:span></text:a></text:p>
      <text:p text:style-name="Standard"/>
      <text:p text:style-name="Standard">Les illustrations suivantes et certaines portions du texte sont tirées des <text:a xlink:type="simple" xlink:href="https://www.boardspace.net/khet/rules_english.pdf" text:style-name="Internet_20_link" text:visited-style-name="Visited_20_Internet_20_Link"><text:span text:style-name="T1">règles</text:span></text:a></text:p>
      <text:p text:style-name="Standard">officielles. N'hésitez pas à les consulter.</text:p>
      <text:p text:style-name="Standard"/>
      <text:p text:style-name="Standard">2.1.1. Les pièces</text:p>
      <text:p text:style-name="Standard"/>
      <text:p text:style-name="Standard">Il y a deux sets de pièces, les rouges et les grises. Chaque joueur choisi un set.</text:p>
      <text:p text:style-name="Standard">Chaque joueur dispose des pièces suivantes :</text:p>
      <text:p text:style-name="Standard">• Pharaon (1 exemplaire) : S'il est touché par un rayon laser venant de n'importe</text:p>
      <text:p text:style-name="Standard">quelle direction, le joueur perd la partie.</text:p>
      <text:p text:style-name="Standard">• Sphinx (1 exemplaire) : Il éclaire dans une direction. Il est toujours positionné dans</text:p>
      <text:p text:style-name="Standard">le coin de plateau qui lui est attribué et ne peut pas se déplacer. Il absorbe les</text:p>
      <text:p text:style-name="Standard">rayons lasers venant de toutes les directions.</text:p>
      <text:p text:style-name="Standard">• Scarabée (2 exemplaires) : Il réfléchi les rayons lasers venant de toutes les</text:p>
      <text:p text:style-name="Standard">directions.</text:p>
      <text:p text:style-name="Standard">• Pyramide (7 exemplaires) : Elle réfléchi les rayons lasers sur deux directions mais</text:p>
      <text:p text:style-name="Standard">est détruite par les rayons venant des deux autres.</text:p>
      <text:p text:style-name="Standard">• Anubis (2 exemplaires) : Il absorbe les rayons lasers sur une direction mais est</text:p>
      <text:p text:style-name="Standard">détruit par les rayons venant sur les trois autres.</text:p>
      <text:p text:style-name="Standard"/>
      <text:p text:style-name="Standard"><text:a xlink:type="simple" xlink:href="https://ibb.co/XF7HLSc" text:style-name="Internet_20_link" text:visited-style-name="Visited_20_Internet_20_Link"><text:span text:style-name="T1">Voici la liste des pièces</text:span></text:a></text:p>
      <text:p text:style-name="Standard"/>
      <text:p text:style-name="Standard">2.1.2. Rotations</text:p>
      <text:p text:style-name="Standard"/>
      <text:p text:style-name="Standard">Chaque pièce est orientée (nord/sud/est/ouest) et peut être tournée de 90 degrés (1/4</text:p>
      <text:p text:style-name="Standard">de tour) dans n'importe quel sens. Tourner de 180 degrés (passer du nord au sud par</text:p>
      <text:p text:style-name="Standard">exemple) ne pourra donc se faire qu'en plusieurs tours de jeu.</text:p>
      <text:p text:style-name="Standard">Le sphinx doit être orienté de manière à ce que son rayon laser soit sur le plateau de</text:p>
      <text:p text:style-name="Standard"><text:soft-page-break/>jeu. Depuis sa position imposée (coin de plateau), il n'a que deux orientation possibles.</text:p>
      <text:p text:style-name="Standard"/>
      <text:p text:style-name="Standard"/>
      <text:p text:style-name="Standard"/>
      <text:p text:style-name="Standard"/>
      <text:p text:style-name="Standard">2.1.3. Déplacements</text:p>
      <text:p text:style-name="Standard"/>
      <text:p text:style-name="P1">Les déplacements ne changent pas l'orientation des pièces.</text:p>
      <text:p text:style-name="Standard">Le sphinx ne peut pas se déplacer.</text:p>
      <text:p text:style-name="Standard">Les autres pièces peuvent se déplacer vers l'une des 8 cases adjacentes, pourvu</text:p>
      <text:p text:style-name="Standard">qu'elle soit vide et qu'elle ne soit pas de la couleur adverse (voir section 2.1).</text:p>
      <text:p text:style-name="Standard">Un scarabée peut se déplacer sur une case occupée par un anubis ou une pyramide</text:p>
      <text:p text:style-name="Standard">(peu importe sa couleur). Dans ce cas il échangera sa position avec la pièce concernée.</text:p>
      <text:p text:style-name="Standard"/>
      <text:p text:style-name="Standard">2.1.4. Configurations initiales</text:p>
      <text:p text:style-name="Standard"/>
      <text:p text:style-name="Standard">Il y a trois configurations de départ standards :</text:p>
      <text:p text:style-name="Standard">1. Classique:</text:p>
      <text:p text:style-name="Standard"/>
      <text:p text:style-name="P2"><text:a xlink:type="simple" xlink:href="https://ibb.co/6NwGqXQ" text:style-name="Internet_20_link" text:visited-style-name="Visited_20_Internet_20_Link"><text:span text:style-name="T1">Configuration classique</text:span></text:a></text:p>
      <text:p text:style-name="P2"/>
      <text:p text:style-name="Standard">2. Imhotep:</text:p>
      <text:p text:style-name="Standard"/>
      <text:p text:style-name="Standard"><text:a xlink:type="simple" xlink:href="https://ibb.co/fx0h4Qq" text:style-name="Internet_20_link" text:visited-style-name="Visited_20_Internet_20_Link"><text:span text:style-name="T2">Configuration imhotep</text:span></text:a></text:p>
      <text:p text:style-name="Standard"/>
      <text:p text:style-name="Standard">3. Dynasty:</text:p>
      <text:p text:style-name="Standard"/>
      <text:p text:style-name="Standard"><text:a xlink:type="simple" xlink:href="https://ibb.co/YDkrRWb" text:style-name="Internet_20_link" text:visited-style-name="Visited_20_Internet_20_Link"><text:span text:style-name="T2">Configuration Dynasty</text:span></text:a></text:p>
      <text:p text:style-name="Standard"/>
      <text:p text:style-name="Standard">Les cases marquées en rouge (toutes les cases de la première colonne et la première</text:p>
      <text:p text:style-name="Standard">et dernière case de l'avant dernière colonne) appartiennent au joueur rouge. Le joueur</text:p>
      <text:p text:style-name="Standard">gris ne peut pas y mettre ses pièces. De même pour les cases en gris qui appartiennent</text:p>
      <text:p text:style-name="Standard">au joueur gris et sont interdites au joueur rouge.</text:p>
      <text:p text:style-name="Standard">Votre jeu doit permettre de choisir entre les trois configuration initiales. Vous</text:p>
      <text:p text:style-name="Standard">devrez également permettre à l'utilisateur de créer des configurations de début</text:p>
      <text:p text:style-name="Standard">personnalisées, qui seront ajoutées à la liste des propositions de départ.</text:p>
      <text:p text:style-name="Standard"/>
      <text:p text:style-name="Standard">2.1.5. Rayons</text:p>
      <text:p text:style-name="Standard"/>
      <text:p text:style-name="Standard">Lorsqu'un rayon laser atteint un scarabée ou la face miroir d'une pyramide, il est réfléchi</text:p>
      <text:p text:style-name="Standard">de 90° et poursuit sa route :</text:p>
      <text:p text:style-name="Standard"><text:a xlink:type="simple" xlink:href="https://ibb.co/Xz8DFrL" text:style-name="Internet_20_link" text:visited-style-name="Visited_20_Internet_20_Link"><text:span text:style-name="T2">Face-miroir</text:span></text:a></text:p>
      <text:p text:style-name="Standard">Si un rayon laser frappe la face non-mirroir d'une pyramide, la pyramide est détruite</text:p>
      <text:p text:style-name="Standard">et le laser ne va pas plus loin :</text:p>
      <text:p text:style-name="Standard"><text:a xlink:type="simple" xlink:href="https://ibb.co/nB4tsy4" text:style-name="Internet_20_link" text:visited-style-name="Visited_20_Internet_20_Link"><text:span text:style-name="T2">Face non-miroir</text:span></text:a></text:p>
      <text:p text:style-name="Standard">Lorsqu'un rayon laser frappe le côté ou la face arrière d'un anubis, l'anubis est détruit</text:p>
      <text:p text:style-name="Standard">et le laser ne va pas plus loin :</text:p>
      <text:p text:style-name="Standard"><text:a xlink:type="simple" xlink:href="https://ibb.co/Pc4qDCS" text:style-name="Internet_20_link" text:visited-style-name="Visited_20_Internet_20_Link"><text:span text:style-name="T2">Anubis</text:span></text:a></text:p>
      <text:p text:style-name="Standard"/>
      <text:p text:style-name="Standard">2.1.6. Gameplay</text:p>
      <text:p text:style-name="Standard"/>
      <text:p text:style-name="Standard">Les joueurs jouent l'un après l'autre. A son tour, chaque joueur doit :</text:p>
      <text:p text:style-name="Standard"><text:soft-page-break/>• Déplacer OU tourner une pièce</text:p>
      <text:p text:style-name="Standard">• Tirer un rayon laser avec son sphinx</text:p>
      <text:p text:style-name="Standard">Le joueur a gagné si son laser éclaire le pharaon adverse.</text:p>
      <text:p text:style-name="Standard"/>
      <text:p text:style-name="Standard">2.1.7. Ressources vidéo</text:p>
      <text:p text:style-name="Standard"/>
      <text:p text:style-name="Standard">Voici quelques exemples vidéo qui illustrent à quoi votre jeu pourrait ressembler :</text:p>
      <text:p text:style-name="Standard">• <text:a xlink:type="simple" xlink:href="https://www.youtube.com/watch?v=ZfJYFHriBKQ" text:style-name="Internet_20_link" text:visited-style-name="Visited_20_Internet_20_Link"><text:span text:style-name="T2">Khet on stream 1</text:span></text:a></text:p>
      <text:p text:style-name="Standard">• <text:a xlink:type="simple" xlink:href="https://www.youtube.com/watch?v=hwHhNUCKuo4" text:style-name="Internet_20_link" text:visited-style-name="Visited_20_Internet_20_Link"><text:span text:style-name="T2">Khet on stream 2</text:span></text:a></text:p>
      <text:p text:style-name="Standard"/>
      <text:p text:style-name="Standard">2.2. Multijoueur</text:p>
      <text:p text:style-name="Standard"/>
      <text:p text:style-name="Standard">Votre jeu est obligatoirement multijoueur (aucune IA n'est demandée). Il doit cependant</text:p>
      <text:p text:style-name="Standard">proposer deux modes: Dans le premier mode, les deux joueurs s'affrontent à tour de</text:p>
      <text:p text:style-name="Standard">rôle sur le même ordinateur. Dans le second mode ils s'affrontent en réseau. Dans</text:p>
      <text:p text:style-name="Standard">ce cas l'un des joueurs crée une partie et l'autre la rejoint. Il doit pour cela connaître</text:p>
      <text:p text:style-name="Standard">l'adresse IP du joueur qui crée la partie.</text:p>
      <text:p text:style-name="Standard"/>
      <text:p text:style-name="Standard">3. Livrables</text:p>
      <text:p text:style-name="Standard"/>
      <text:p text:style-name="Standard">Vous devrez rendre les éléments suivants:</text:p>
      <text:p text:style-name="Standard">• Une archive zip avec le code source de votre projet. Le cas échéant, le code source</text:p>
      <text:p text:style-name="Standard">doit être accompagné du système de compilation (fichier projet, Makefile, ...)</text:p>
      <text:p text:style-name="Standard">• La documentation du projet qui explique vos choix et/ou décisions d'implémentation</text:p>
      <text:p text:style-name="Standard">concernant :</text:p>
      <text:p text:style-name="Standard">• Le moteur graphique</text:p>
      <text:p text:style-name="Standard">• Les choix algorithmiques (structures de données pour le plateau de jeu, les</text:p>
      <text:p text:style-name="Standard">pièces, la trajectoire du laser,...)</text:p>
      <text:p text:style-name="Standard"/>
      <text:p text:style-name="Standard">4. Grille d'évaluation</text:p>
      <text:p text:style-name="Standard"/>
      <text:p text:style-name="Standard">Le projet sera évalué selon la grille suivante, comprenant 120 points sur 100 :</text:p>
      <text:p text:style-name="Standard">• Documentation : 10 points</text:p>
      <text:p text:style-name="Standard">• Documentation technique: 10 points</text:p>
      <text:p text:style-name="Standard">• Moteur de jeu : 20 points</text:p>
      <text:p text:style-name="Standard">• Design global : 4 points</text:p>
      <text:p text:style-name="Standard">• Affichage des trajectoires des lasers : 4 points</text:p>
      <text:p text:style-name="Standard">• Sélection d'une configuration initiale : 4 points</text:p>
      <text:p text:style-name="Standard">• Fin de jeu et retour à l'écran principal : 4 points</text:p>
      <text:p text:style-name="Standard">• Système de menus: 4 points</text:p>
      <text:p text:style-name="Standard">• Multijoueur : 20 points</text:p>
      <text:p text:style-name="Standard">• Deux joueurs peuvent s'affronter sur la même machine : 5 points</text:p>
      <text:p text:style-name="Standard">• Deux joueurs peuvent s'affronter en réseau : 15 points</text:p>
      <text:p text:style-name="Standard">• Gameplay : 30 points</text:p>
      <text:p text:style-name="Standard">• Le joueur peut sélectionner/désélectionner une pièce : 3 points</text:p>
      <text:p text:style-name="Standard">• Lorsqu'une pièce est sélectionnée, les destinations et rotations possibles sont</text:p>
      <text:p text:style-name="Standard">mises en évidence : 3 points</text:p>
      <text:p text:style-name="Standard">• Lorsqu'une pièce est sélectionnée, le joueur peut choisir entre la déplacer et</text:p>
      <text:p text:style-name="Standard">la tourner : 3 points</text:p>
      <text:p text:style-name="Standard">• Les pièces se déplacent correctement vers une case adjacente libre : 3 points</text:p>
      <text:p text:style-name="Standard">• Un scarabée peut échanger sa position avec un Anubis ou une pyramide : 3</text:p>
      <text:p text:style-name="Standard">points</text:p>
      <text:p text:style-name="Standard"><text:soft-page-break/>• Les pièces tournent : 2 points</text:p>
      <text:p text:style-name="Standard">• Le joueur peut activer son laser : 2 points</text:p>
      <text:p text:style-name="Standard">• Un rayon laser est réfléchi par un scarabée : 3 points</text:p>
      <text:p text:style-name="Standard">• Un rayon laser est réfléchi par une pyramide ou la détruit en fonction de la face</text:p>
      <text:p text:style-name="Standard">qu'il touche : 3 points</text:p>
      <text:p text:style-name="Standard">• Un rayon laser est absorbé par une anubis ou le détruit en fonction de la face</text:p>
      <text:p text:style-name="Standard">qu'il touche : 3 points</text:p>
      <text:p text:style-name="Standard">• Un rayon laser détruit un pharaon : 2 points</text:p>
      <text:p text:style-name="Standard">• Editeur de positions initiales : 20 points</text:p>
      <text:p text:style-name="Standard">• L'utilisateur peut choisir la position des pièces : 7 points</text:p>
      <text:p text:style-name="Standard">• L'utilisateur peut choisir l'orientation des pièces : 7 points</text:p>
      <text:p text:style-name="Standard">• L'utilisateur peut sauvegarder/éditer/renommer/supprimer les configurations</text:p>
      <text:p text:style-name="Standard">qu'il a crée : 6 points</text:p>
      <text:p text:style-name="Standard">• Bonus: 20 points</text:p>
      <text:p text:style-name="Standard">• Fonctionnalités supplémentaires réalisées par les étudiants : 20 poin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1:52:06.499405254</meta:creation-date>
    <dc:date>2024-11-08T13:22:13.233532935</dc:date>
    <meta:editing-duration>PT14M55S</meta:editing-duration>
    <meta:editing-cycles>2</meta:editing-cycles>
    <meta:generator>LibreOffice/24.8.2.1$Linux_X86_64 LibreOffice_project/41740883c77b073d14011387305cb18c71aed59b</meta:generator>
    <meta:document-statistic meta:table-count="0" meta:image-count="0" meta:object-count="0" meta:page-count="4" meta:paragraph-count="134" meta:word-count="1207" meta:character-count="6945" meta:non-whitespace-character-count="5872"/>
  </office:meta>
</office:document-meta>
</file>